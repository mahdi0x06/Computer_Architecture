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4B00000416148CCFDF.png" manifest:media-type="image/png"/>
  <manifest:file-entry manifest:full-path="Pictures/100000010000077D00000442891CD1D4.png" manifest:media-type="image/png"/>
  <manifest:file-entry manifest:full-path="Pictures/1000000100000642000004304ADC5306.png" manifest:media-type="image/png"/>
  <manifest:file-entry manifest:full-path="Pictures/100000010000064200000430309B7914.png" manifest:media-type="image/png"/>
  <manifest:file-entry manifest:full-path="Pictures/1000000100000642000004309E44944F.png" manifest:media-type="image/png"/>
  <manifest:file-entry manifest:full-path="Pictures/10000001000006420000043076CE89E2.png" manifest:media-type="image/png"/>
  <manifest:file-entry manifest:full-path="Pictures/100000010000011B0000011C55F2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ystem" style:font-pitch="variable"/>
    <style:font-face style:name="F" svg:font-family="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Contents_20_2">
      <style:paragraph-properties fo:text-align="end" style:justify-single-word="false"/>
      <style:text-properties officeooo:paragraph-rsid="000c61b3"/>
    </style:style>
    <style:style style:name="P3" style:family="paragraph" style:parent-style-name="Contents_20_Heading">
      <style:paragraph-properties fo:text-align="end" style:justify-single-word="false" style:writing-mode="rl-tb"/>
      <style:text-properties style:font-name="B Nazanin" officeooo:paragraph-rsid="00043114" style:font-name-complex="B Nazanin"/>
    </style:style>
    <style:style style:name="P4" style:family="paragraph" style:parent-style-name="Footer">
      <style:paragraph-properties fo:text-align="center" style:justify-single-word="false"/>
    </style:style>
    <style:style style:name="P5" style:family="paragraph" style:parent-style-name="Header">
      <style:paragraph-properties fo:text-align="center" style:justify-single-word="false" style:writing-mode="rl-tb"/>
      <style:text-properties style:font-name="B Nazanin" fo:font-size="15pt" officeooo:paragraph-rsid="00043114" style:font-size-asian="15pt" style:font-name-complex="B Nazanin" style:font-size-complex="15pt" style:language-complex="fa" style:country-complex="IR"/>
    </style:style>
    <style:style style:name="P6" style:family="paragraph" style:parent-style-name="Heading_20_2">
      <style:paragraph-properties fo:text-align="end" style:justify-single-word="false" style:writing-mode="rl-tb"/>
      <style:text-properties style:font-name="B Nazanin" fo:font-size="18pt" fo:font-weight="bold" officeooo:paragraph-rsid="00043114" style:font-size-asian="18pt" style:font-weight-asian="bold" style:font-name-complex="B Nazanin" style:font-size-complex="18pt" style:font-weight-complex="bold"/>
    </style:style>
    <style:style style:name="P7" style:family="paragraph" style:parent-style-name="Heading_20_2">
      <style:paragraph-properties fo:text-align="end" style:justify-single-word="false" style:writing-mode="rl-tb"/>
      <style:text-properties style:font-name="B Nazanin" style:font-name-complex="B Nazanin"/>
    </style:style>
    <style:style style:name="P8" style:family="paragraph" style:parent-style-name="Heading_20_2">
      <style:paragraph-properties fo:text-align="end" style:justify-single-word="false" style:writing-mode="rl-tb"/>
      <style:text-properties style:font-name="B Nazanin" officeooo:paragraph-rsid="00095bba" style:font-name-complex="B Nazanin"/>
    </style:style>
    <style:style style:name="P9" style:family="paragraph" style:parent-style-name="Standard">
      <style:paragraph-properties fo:text-align="end" style:justify-single-word="false" style:writing-mode="rl-tb"/>
      <style:text-properties style:font-name="B Nazanin" fo:font-size="18pt" fo:font-weight="bold" officeooo:rsid="0007e85f" officeooo:paragraph-rsid="0007e85f" style:font-size-asian="18pt" style:font-weight-asian="bold" style:font-name-complex="B Nazanin" style:font-size-complex="18pt" style:font-weight-complex="bold"/>
    </style:style>
    <style:style style:name="P10" style:family="paragraph" style:parent-style-name="Standard">
      <style:paragraph-properties fo:text-align="end" style:justify-single-word="false" style:writing-mode="rl-tb"/>
      <style:text-properties style:font-name="B Nazanin" fo:font-size="12pt" fo:font-weight="normal" officeooo:paragraph-rsid="000a1103" style:font-size-asian="10.5pt" style:font-weight-asian="normal" style:font-name-complex="B Nazanin" style:font-size-complex="12pt" style:font-weight-complex="normal"/>
    </style:style>
    <style:style style:name="P11" style:family="paragraph" style:parent-style-name="Standard_20__28_WW_29_">
      <style:paragraph-properties fo:text-align="center" style:justify-single-word="false" style:writing-mode="rl-tb"/>
      <style:text-properties style:font-name="B Nazanin" officeooo:paragraph-rsid="00043114" style:font-name-complex="B Nazanin"/>
    </style:style>
    <style:style style:name="P12" style:family="paragraph" style:parent-style-name="Standard_20__28_WW_29_">
      <style:paragraph-properties fo:text-align="end" style:justify-single-word="false" style:writing-mode="rl-tb"/>
      <style:text-properties style:font-name="B Nazanin" officeooo:paragraph-rsid="00043114" style:font-name-complex="B Nazanin"/>
    </style:style>
    <style:style style:name="P13" style:family="paragraph" style:parent-style-name="Standard_20__28_WW_29_">
      <style:paragraph-properties fo:text-align="center" style:justify-single-word="false" style:writing-mode="rl-tb"/>
      <style:text-properties style:font-name="B Nazanin" fo:font-size="20pt" officeooo:paragraph-rsid="00043114" style:font-size-asian="20pt" style:font-name-complex="B Nazanin" style:font-size-complex="20pt" style:language-complex="ar" style:country-complex="SA"/>
    </style:style>
    <style:style style:name="P14" style:family="paragraph" style:parent-style-name="Standard_20__28_WW_29_">
      <style:paragraph-properties fo:text-align="center" style:justify-single-word="false" style:writing-mode="rl-tb"/>
      <style:text-properties style:font-name="B Nazanin" fo:font-size="20pt" fo:font-weight="bold" officeooo:paragraph-rsid="00043114" style:font-size-asian="20pt" style:font-weight-asian="bold" style:font-name-complex="B Nazanin" style:font-size-complex="20pt" style:font-weight-complex="bold"/>
    </style:style>
    <style:style style:name="P15" style:family="paragraph" style:parent-style-name="Standard_20__28_WW_29_">
      <style:paragraph-properties fo:text-align="center" style:justify-single-word="false" style:writing-mode="rl-tb"/>
      <style:text-properties style:font-name="B Nazanin" fo:font-size="17pt" officeooo:paragraph-rsid="00043114" style:font-size-asian="17pt" style:font-name-complex="B Nazanin" style:font-size-complex="14pt" style:language-complex="ar" style:country-complex="SA"/>
    </style:style>
    <style:style style:name="P16" style:family="paragraph" style:parent-style-name="Standard_20__28_WW_29_">
      <style:paragraph-properties fo:text-align="end" style:justify-single-word="false" style:writing-mode="rl-tb"/>
      <style:text-properties style:font-name="B Nazanin" fo:font-size="17pt" officeooo:paragraph-rsid="00043114" style:font-size-asian="17pt" style:font-name-complex="B Nazanin" style:font-size-complex="14pt" style:language-complex="ar" style:country-complex="SA"/>
    </style:style>
    <style:style style:name="P17" style:family="paragraph" style:parent-style-name="Text_20_body">
      <style:paragraph-properties fo:text-align="end" style:justify-single-word="false" style:writing-mode="rl-tb"/>
      <style:text-properties style:font-name="B Nazanin" style:font-name-complex="B Nazanin"/>
    </style:style>
    <style:style style:name="P18" style:family="paragraph" style:parent-style-name="Text_20_body" style:list-style-name="L1">
      <style:paragraph-properties fo:text-align="end" style:justify-single-word="false" style:writing-mode="rl-tb"/>
      <style:text-properties style:font-name="B Nazanin" style:font-name-complex="B Nazanin"/>
    </style:style>
    <style:style style:name="P19" style:family="paragraph" style:parent-style-name="Text_20_body" style:list-style-name="L1">
      <style:paragraph-properties fo:text-align="end" style:justify-single-word="false" style:writing-mode="rl-tb"/>
      <style:text-properties style:font-name="B Nazanin" officeooo:paragraph-rsid="00095bba" style:font-name-complex="B Nazanin"/>
    </style:style>
    <style:style style:name="P20" style:family="paragraph" style:parent-style-name="Text_20_body" style:list-style-name="L2">
      <style:paragraph-properties fo:text-align="end" style:justify-single-word="false" style:writing-mode="rl-tb"/>
      <style:text-properties style:font-name="B Nazanin" style:font-name-complex="B Nazanin"/>
    </style:style>
    <style:style style:name="P21" style:family="paragraph" style:parent-style-name="Text_20_body" style:list-style-name="L3">
      <style:paragraph-properties fo:text-align="end" style:justify-single-word="false" style:writing-mode="rl-tb"/>
      <style:text-properties style:font-name="B Nazanin" style:font-name-complex="B Nazanin"/>
    </style:style>
    <style:style style:name="P22" style:family="paragraph" style:parent-style-name="Text_20_body" style:list-style-name="L4">
      <style:paragraph-properties fo:text-align="end" style:justify-single-word="false" style:writing-mode="rl-tb"/>
      <style:text-properties style:font-name="B Nazanin" style:font-name-complex="B Nazanin"/>
    </style:style>
    <style:style style:name="P23" style:family="paragraph" style:parent-style-name="Text_20_body">
      <style:paragraph-properties fo:text-align="end" style:justify-single-word="false" style:writing-mode="rl-tb"/>
      <style:text-properties style:font-name="B Nazanin" officeooo:paragraph-rsid="000a1103" style:font-name-complex="B Nazanin"/>
    </style:style>
    <style:style style:name="P24" style:family="paragraph" style:parent-style-name="Text_20_body">
      <style:paragraph-properties fo:text-align="end" style:justify-single-word="false" style:writing-mode="rl-tb"/>
      <style:text-properties style:font-name="B Nazanin" officeooo:rsid="000a1103" officeooo:paragraph-rsid="000a1103" style:font-name-complex="B Nazanin"/>
    </style:style>
    <style:style style:name="T1" style:family="text">
      <style:text-properties fo:color="#000000" loext:opacity="100%" fo:font-size="28pt" fo:font-weight="bold" style:font-name-asian="Times New Roman" style:font-size-asian="28pt" style:font-weight-asian="bold" style:font-size-complex="28pt" style:language-complex="ar" style:country-complex="SA" style:font-weight-complex="bold"/>
    </style:style>
    <style:style style:name="T2" style:family="text">
      <style:text-properties fo:color="#000000" loext:opacity="100%" fo:font-size="28pt" fo:font-weight="bold" officeooo:rsid="000f8581" style:font-name-asian="Times New Roman" style:font-size-asian="28pt" style:font-weight-asian="bold" style:font-size-complex="28pt" style:language-complex="ar" style:country-complex="SA"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8pt" style:font-size-asian="18pt" style:font-size-complex="18pt" style:language-complex="ar" style:country-complex="SA"/>
    </style:style>
    <style:style style:name="T5" style:family="text">
      <style:text-properties fo:font-size="20pt" fo:font-weight="bold" style:font-size-asian="20pt" style:font-weight-asian="bold" style:font-size-complex="20pt" style:language-complex="ar" style:country-complex="SA" style:font-weight-complex="bold"/>
    </style:style>
    <style:style style:name="T6" style:family="text">
      <style:text-properties fo:font-size="19pt" style:font-size-asian="19pt" style:font-size-complex="18pt" style:language-complex="ar" style:country-complex="SA"/>
    </style:style>
    <style:style style:name="T7" style:family="text">
      <style:text-properties style:font-name="B Nazanin" style:font-name-complex="B Nazanin"/>
    </style:style>
    <style:style style:name="T8" style:family="text">
      <style:text-properties style:font-name="B Nazanin" style:font-name-complex="B Nazanin" text:display="true"/>
    </style:style>
    <style:style style:name="T9" style:family="text">
      <style:text-properties style:font-name="B Nazanin" style:font-name-complex="B Nazanin" style:language-complex="fa" style:country-complex="IR" text:display="true"/>
    </style:style>
    <style:style style:name="T10" style:family="text">
      <style:text-properties style:font-name="B Nazanin" officeooo:rsid="001d232b" style:font-name-complex="B Nazanin" style:language-complex="fa" style:country-complex="IR" text:display="true"/>
    </style:style>
    <style:style style:name="T11" style:family="text">
      <style:text-properties style:font-name="B Nazanin" officeooo:rsid="000e9225" style:font-name-complex="B Nazanin" style:language-complex="fa" style:country-complex="IR" text:display="true"/>
    </style:style>
    <style:style style:name="T12" style:family="text">
      <style:text-properties style:font-name="B Nazanin" fo:font-size="10.5pt" fo:font-weight="normal" style:font-size-asian="10.5pt" style:font-weight-asian="normal" style:font-name-complex="B Nazanin" style:font-size-complex="10.5pt" style:language-complex="fa" style:country-complex="IR" style:font-weight-complex="normal" text:display="true"/>
    </style:style>
    <style:style style:name="T13" style:family="text">
      <style:text-properties officeooo:rsid="00071127"/>
    </style:style>
    <style:style style:name="T14" style:family="text">
      <style:text-properties officeooo:rsid="0007306b"/>
    </style:style>
    <style:style style:name="T15" style:family="text">
      <style:text-properties officeooo:rsid="000845c4"/>
    </style:style>
    <style:style style:name="T16" style:family="text">
      <style:text-properties officeooo:rsid="00095bba"/>
    </style:style>
    <style:style style:name="T17" style:family="text">
      <style:text-properties officeooo:rsid="000a1103"/>
    </style:style>
    <style:style style:name="T18" style:family="text">
      <style:text-properties officeooo:rsid="000b598f"/>
    </style:style>
    <style:style style:name="T19" style:family="text">
      <style:text-properties officeooo:rsid="000f858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draw:frame draw:style-name="fr4" draw:name="Picture 1" text:anchor-type="as-char" svg:width="1.5346in" svg:height="1.3398in" draw:z-index="0"><draw:image xlink:href="Pictures/100000010000011B0000011C55F2A915.png" xlink:type="simple" xlink:show="embed" xlink:actuate="onLoad" draw:mime-type="image/png"/></draw:frame></text:p>
      <text:p text:style-name="P11"/>
      <text:p text:style-name="P11"><text:span text:style-name="T1">طراحی</text:span><text:span text:style-name="T2"> ضرب/تقسیم کننده ترتیبی</text:span></text:p>
      <text:p text:style-name="P13">معماری کامپیوتر – گزارش کار تمرین عملی <text:span text:style-name="T19">سوم</text:span></text:p>
      <text:p text:style-name="P5"/>
      <text:p text:style-name="P11"/>
      <text:p text:style-name="P11"/>
      <text:p text:style-name="P11"/>
      <text:p text:style-name="P11"/>
      <text:p text:style-name="P11"/>
      <text:p text:style-name="P11"><text:span text:style-name="T4">استاد</text:span></text:p>
      <text:p text:style-name="P11"><text:span text:style-name="T5">دکتر سربازی آزاد</text:span></text:p>
      <text:p text:style-name="P11"/>
      <text:p text:style-name="P14"/>
      <text:p text:style-name="P11"><text:span text:style-name="T5">دانشگاه صنعتی شریف</text:span></text:p>
      <text:p text:style-name="P11"><text:span text:style-name="T5">بهار 1405</text:span></text:p>
      <text:p text:style-name="P11"/>
      <text:p text:style-name="P15"/>
      <text:p text:style-name="P15"/>
      <text:p text:style-name="P16"/>
      <text:p text:style-name="P16"/>
      <text:p text:style-name="P11"><text:span text:style-name="T6">محمد مهدی مرادی – 403106681</text:span></text:p>
      <text:p text:style-name="P11"><text:span text:style-name="T6"/></text:p>
      <text:p text:style-name="P3"><text:soft-page-break/><text:span text:style-name="T3">فهرست</text:span></text:p>
      <text:p text:style-name="P12"/>
      <text:p text:style-name="P2"><text:span text:style-name="T12"><text:s/>مقدمه و توصیف کلی مدارها</text:span><text:a xlink:type="simple" xlink:href="#_Toc228144979" text:style-name="Index_20_Link" text:visited-style-name="Index_20_Link"><text:span text:style-name="T8"><text:tab/></text:span><text:span text:style-name="T9">3</text:span></text:a></text:p>
      <text:p text:style-name="P2"><text:span text:style-name="T10">1- مدار ضرب‌کننده ۳۲ بیتی (MUL)</text:span><text:a xlink:type="simple" xlink:href="#_Toc228144980" text:style-name="Index_20_Link" text:visited-style-name="Index_20_Link"><text:span text:style-name="T8"><text:tab/></text:span><text:span text:style-name="T9">3</text:span></text:a></text:p>
      <text:p text:style-name="P2"><text:span text:style-name="T10">2-مدار تقسیم‌کننده ۳۲ بیتی (DIV)</text:span><text:a xlink:type="simple" xlink:href="#_Toc228144980" text:style-name="Index_20_Link" text:visited-style-name="Index_20_Link"><text:span text:style-name="T8"><text:tab/></text:span><text:span text:style-name="T11">7</text:span></text:a></text:p>
      <text:p text:style-name="P2"><text:span text:style-name="T11">3</text:span><text:span text:style-name="T10">- واحد اصلی و ادغام مدارها (Main)</text:span><text:a xlink:type="simple" xlink:href="#_Toc228144980" text:style-name="Index_20_Link" text:visited-style-name="Index_20_Link"><text:span text:style-name="T8"><text:tab/></text:span><text:span text:style-name="T11">8</text:span></tex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P6" text:outline-level="2">۱. مقدمه و توصیف کلی مدارها<text:span text:style-name="T7"/></text:h>
      <text:p text:style-name="P17">هدف از این پروژه، طراحی و پیاده‌سازی یک واحد سخت‌افزاری مستقل برای انجام دو عملیات ریاضی ضرب (Multiplication) و تقسیم (Division) روی اعداد ۳۲ بیتی بدون علامت است. هر دو مدار به صورت ترتیبی (Sequential) و سنکرون با سیگنال کلاک (Clk) طراحی شده‌اند و ساختار کنترلر آن‌ها بر اساس یک شمارنده داخلی پیاده‌سازی شده است که چرخه محاسبات را مدیریت می‌کند. برای افزایش کارایی و بهینه‌سازی سخت‌افزاری، هر دو مدار به گونه‌ای توسعه یافته‌اند که در هر سیکل کلاک، یک بیت از محاسبات را جلو ببرند؛ به این معنی که هر دو عملیات ضرب و تقسیم دقیقاً پس از ۳۲ سیکل کلاک به پایان می‌رسند. در نهایت، این دو بلوک مستقل در یک ماژول بالاتر (Top Module) به نام Main ترکیب شده و خروجی آن‌ها بر اساس سیگنال کنترلی انتخاب نوع عملیات، مدیریت می‌شود.</text:p>
      <text:h text:style-name="P7" text:outline-level="2">۲. مدار ضرب‌کننده ۳۲ بیتی (MUL)</text:h>
      <text:p text:style-name="P17">مدار ضرب‌کننده طراحی شده، الگوریتم ضرب ترتیبی استاندارد را با استفاده از رجیسترهای شیفت و جمع‌کننده پیاده‌سازی می‌کند. این مدار شامل دو بخش اصلی «مسیر داده» (Datapath) و «بخش کنترل» (Control Unit) است که عملکرد جزئی هر کدام به شرح زیر است:</text:p>
      <text:p text:style-name="P17">الف) مسیر داده (Datapath) ضرب‌کننده:</text:p>
      <text:list text:style-name="L1">
        <text:list-item>
          <text:p text:style-name="P18">ثبات ضرب‌کننده (Multiplier): عدد اول ۳۲ بیتی در این ثبات لود می‌شود و در هر کلاک یک بیت به راست شیفت می‌خورد تا بیت کم‌ارزش آن (بیت شماره ۰) بررسی شود.</text:p>
        </text:list-item>
        <text:list-item>
          <text:p text:style-name="P18">ثبات حاصل‌ضرب (Product): یک ثبات ۶۴ بیتی (ثبات P) است که برای ذخیره‌سازی موقت و نهایی حاصل‌ضرب استفاده می‌شود. در ابتدا نیمه پایین آن با عدد ضرب‌شونده (Multiplicand) مقداردهی اولیه می‌شود.</text:p>
        </text:list-item>
        <text:list-item>
          <text:p text:style-name="P19">بلوک جمع‌کننده و ترکیب‌کننده: در هر مرحله، اگر بیت کم‌ارزش ثبات ضرب‌کننده برابر با ۱ باشد، مقدار ضرب‌شونده با نیمه بالای ثبات حاصل‌ضرب جمع شده و نتیجه همراه با بیت کری (Carry) و نیمه پایین، دوباره با یک بیت شیفت به راست در ثبات ۶۴ بیتی ذخیره می‌شود. این کار با استفاده از یک جاینر (Joiner) سه تکه برای پورت ۱ مالتی‌پلکسر ورودی ثبات انجام شده است</text:p>
          <text:p text:style-name="P19">.ب) بخش کنترل (Control Unit) ضرب‌کننده: کنترل این مدار با سیگنال Start آغاز می‌شود. یک شمارنده ۵ بیتی وظیفه شمارش ۳۲ گام محاسبات را بر عهده دارد. تا زمانی که مدار در حال محاسبه است (سیگنال CALC فعال است)، مالتی‌پلکسر ورودی ثبات روی حالت شیفت و جمع تنظیم می‌ماند. پس از رسیدن شمارنده به عدد ۳۲، سیگنال محاسبات قطع شده و سیگنال Done فعال می‌شود که نشان‌دهنده آماده بودن پاسخ نهایی روی دو خروجی ۳۲ بیتی Result_Hi (نیمه بالا) و Result_Lo (نیمه پایین) است.<text:span text:style-name="T15">مدار کنترل هردوبخش ضرب و تقسیم مانند یکدیگر است(شکل1)مدار داخلی واحد ضرب کننده را در شکل 2 مشاهده میکنید.</text:span><text:span text:style-name="T16">در شکل 3 نیز مدارشمارنده ای را که پیاده کردیم میبینیم.</text:span></text:p>
        </text:list-item>
      </text:list>
      <text:p text:style-name="P17"/>
      <text:p text:style-name="P17"><text:soft-page-break/></text:p>
      <text:p text:style-name="P17"><draw:frame draw:style-name="fr1" draw:name="Frame1" text:anchor-type="char" svg:x="0.2425in" svg:y="-0.4646in" svg:width="6.6929in" draw:z-index="7"><draw:text-box fo:min-height="4.4783in"><text:p text:style-name="P1"><draw:frame draw:style-name="fr3" draw:name="Image4" text:anchor-type="paragraph" svg:width="6.6929in" style:rel-width="100%" svg:height="4.4783in" style:rel-height="scale" draw:z-index="8"><draw:image xlink:href="Pictures/10000001000006420000043076CE89E2.png" xlink:type="simple" xlink:show="embed" xlink:actuate="onLoad" draw:mime-type="image/png"/></draw:frame>شکل1</text:p></draw:text-box></draw:frame></text:p>
      <text:p text:style-name="P17"/>
      <text:p text:style-name="P17"><draw:frame draw:style-name="fr1" draw:name="Frame2" text:anchor-type="char" svg:x="0.2in" svg:y="0.1in" svg:width="6.6929in" draw:z-index="9"><draw:text-box fo:min-height="4.4783in"><text:p text:style-name="P1"><draw:frame draw:style-name="fr3" draw:name="Image5" text:anchor-type="paragraph" svg:width="6.6929in" style:rel-width="100%" svg:height="4.4783in" style:rel-height="scale" draw:z-index="10"><draw:image xlink:href="Pictures/1000000100000642000004309E44944F.png" xlink:type="simple" xlink:show="embed" xlink:actuate="onLoad" draw:mime-type="image/png"/></draw:frame>شکل2</text:p></draw:text-box></draw:frame><text:soft-page-break/></text:p>
      <text:h text:style-name="P8" text:outline-level="2"><draw:frame draw:style-name="fr1" draw:name="Frame3" text:anchor-type="char" svg:x="-0.5071in" svg:y="-0.3472in" svg:width="7.8465in" draw:z-index="5"><draw:text-box fo:min-height="5.25in"><text:p text:style-name="P1"><draw:frame draw:style-name="fr3" draw:name="Image3" text:anchor-type="paragraph" svg:width="6.6929in" style:rel-width="100%" svg:height="4.478in" style:rel-height="scale" draw:z-index="6"><draw:image xlink:href="Pictures/100000010000064200000430309B7914.png" xlink:type="simple" xlink:show="embed" xlink:actuate="onLoad" draw:mime-type="image/png"/></draw:frame>شکل3</text:p></draw:text-box></draw:frame><text:soft-page-break/></text:h>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text:soft-page-break/></text:h>
      <text:h text:style-name="P8" text:outline-level="2">۳. مدار تقسیم‌کننده ۳۲ بیتی (DIV)</text:h>
      <text:p text:style-name="P17">مدار تقسیم بر اساس الگوریتم تقسیم ترتیبی جبرانی (Restoring Division) طراحی شده است که با ۳۲ سیکل کلاک عملیات را تکمیل می‌کند. ویژگی بارز و بهینه این مدار، استفاده از جمع‌کننده به همراه منطق مکمل دو به جای تفریق‌کننده مجزا است.</text:p>
      <text:p text:style-name="P17">الف) مسیر داده (Datapath) تقسیم‌کننده:</text:p>
      <text:list text:style-name="L2">
        <text:list-item>
          <text:p text:style-name="P20">ثبات باقیمانده و خارج‌قسمت (ثبات R): یک ثبات ۶۴ بیتی است. در کلاک اول (حالت LOAD)، ۳۲ بیت پایین آن با مقسوم (A) مقداردهی شده و ۳۲ بیت بالای آن صفر می‌شود.</text:p>
        </text:list-item>
        <text:list-item>
          <text:p text:style-name="P20">بلوک شیفت و تفریق سخت‌افزاری: در هر کلاک، کل ثبات ۶۴ بیتی یک بیت به چپ شیفت می‌خورد. سپس نیمه بالای این مقدار شیفت‌خورده وارد مدار تفریق می‌شود. برای انجام تفریق به روش سخت‌افزاری استاندارد، ورودی مقسوم‌علیه (B) ابتدا ۳۲ بیتِ آن NOT منطقی شده و به همراه ورودی کری اولیه یک (Cin = 1) به یک جمع‌کننده (Adder) ۳۲ بیتی متصل می‌شود. این آرایش دقیقاً عمل تفریق (<text:span text:style-name="T13">R</text:span>_Hi - B) را انجام می‌دهد.</text:p>
        </text:list-item>
      </text:list>
      <text:p text:style-name="P17">ب) منطق کنترل مالتی‌پلکسر بر اساس کری خروجی (Cout): پین کری خروجی (Cout) این جمع‌کننده نقشی کلیدی در تعیین وضعیت تفریق دارد:</text:p>
      <text:list text:style-name="L3">
        <text:list-item>
          <text:p text:style-name="P21">اگر Cout = 1 شود: یعنی تفریق موفقیت‌آمیز بوده (حاصل مثبت یا صفر). در این حالت خروجی جمع‌کننده به عنوان باقیمانده جدید در نیمه بالای ثبات قرار می‌گیرد و بیت کم‌ارزش خارج‌قسمت (بیت ۰ در نیمه پایین) برابر با ۱ می‌شود.</text:p>
        </text:list-item>
        <text:list-item>
          <text:p text:style-name="P21">اگر Cout = 0 شود: یعنی تفریق ناموفق بوده (حاصل منفی). در این حالت مقدار تفریق‌شده دور ریخته می‌شود (حالت جبران یا Restoring) و فقط همان مقدار شیفت چپ خورده ساده در ثبات قرار می‌گیرد و بیت کم‌ارزش خارج‌قسمت صفر باقی می‌ماند. این منطق با ترکیب سیگنال CALC و Cout به پایه‌های انتخاب (Selectors) مالتی‌پلکسر ورودی ثبات متصل شده است.</text:p>
        </text:list-item>
      </text:list>
      <text:p text:style-name="P17">ج) بخش کنترل تقسیم‌کننده: همانند ضرب، یک شمارنده داخلی وظیفه مدیریت ۳۲ گام را دارد و پس از پایان کلاک ۳۲، سیگنال Done فعال شده و خارج‌قسمت روی خروجی Result_Lo و باقیمانده روی Result_Hi قرار می‌گیرد.</text:p>
      <text:p text:style-name="P23"><text:span text:style-name="T15">مدار داخلی واحد </text:span><text:span text:style-name="T17">تقسیم</text:span><text:span text:style-name="T15"> کننده را در شکل </text:span><text:span text:style-name="T17">4</text:span><text:span text:style-name="T15"> مشاهده میکنید</text:span></text:p>
      <text:h text:style-name="P7" text:outline-level="2"><text:soft-page-break/>۴. واحد اصلی و ادغام مدارها (Main)<draw:frame draw:style-name="fr1" draw:name="Frame4" text:anchor-type="char" svg:x="0.5252in" svg:y="-0.0736in" svg:width="6.6929in" draw:z-index="11"><draw:text-box fo:min-height="4.4783in"><text:p text:style-name="P1"><draw:frame draw:style-name="fr2" draw:name="Image6" text:anchor-type="paragraph" svg:x="-0.0346in" svg:y="0.0835in" svg:width="6.6929in" style:rel-width="100%" svg:height="4.4783in" style:rel-height="scale" draw:z-index="12"><draw:image xlink:href="Pictures/1000000100000642000004304ADC5306.png" xlink:type="simple" xlink:show="embed" xlink:actuate="onLoad" draw:mime-type="image/png"/></draw:frame>شکل4</text:p></draw:text-box></draw:frame></text:h>
      <text:p text:style-name="P17">در بالاترین سطح معماری این سیستم (Top Level Module)، دو بلوک مستقل MUL و DIV در کنار یکدیگر قرار گرفته‌اند تا یک واحد یکپارچه محاسباتی را تشکیل دهند.</text:p>
      <text:p text:style-name="P17">نحوه اتصال و منطق کارکرد مدار Main به شرح زیر است:</text:p>
      <text:list text:style-name="L4">
        <text:list-item>
          <text:p text:style-name="P22">توزیع سیگنال‌های ورودی: سیگنال‌های کلاک (Clk)، ریست (Rst) و شروع (Start) به صورت موازی و هم‌زمان به هر دو بلوک ضرب و تقسیم فرستاده می‌شوند. همچنین ورودی‌های داده ۳۲ بیتی (A و B) به ورودی‌های هر دو مدار متصل هستند.</text:p>
        </text:list-item>
        <text:list-item>
          <text:p text:style-name="P22">مالتی‌پلکس کردن خروجی‌ها: یک سیگنال ورودی به نام Divide تعیین می‌کند که خروجی کل سیستم حاصل کدام عملیات باشد. دو مالتی‌پلکسر ۳۲ بیتی ۲ به ۱ برای خروجی‌های اصلی تعبیه شده‌اند که پایه سوییچ آن‌ها به سیگنال Divide وصل است. اگر Divide = 0 باشد، خروجی‌های نیمه بالا و پایین مدار ضرب روی پین‌های نهایی قرار می‌گیرند و اگر Divide = 1 باشد، خارج‌قسمت و باقیمانده مدار تقسیم به خروجی منتقل می‌شوند.</text:p>
        </text:list-item>
        <text:list-item>
          <text:p text:style-name="P22">مدیریت سیگنال Done: از آنجا که هر دو مدار با ساختار ۳۲ بیتی بهینه‌سازی شده‌اند و به طور هم‌زمان محاسبات خود را آغاز کرده و دقیقاً در یک کلاک مشخص (کلاک ۳۳ام) پایان کار خود را اعلام می‌کنند، سیگنال‌های Done خروجی آن‌ها با یک مولتی پلکسر که خط انتخاب آن سیگنال <text:span text:style-name="T14">Divide است به</text:span> هم متصل شده است تا سیگنال خروجی نهایی Done <text:soft-page-break/>سیستم را در زمان دقیق و درست فعال کند. این طراحی ماژولار باعث ایزولاسیون کامل دو مدار و تسهیل فرآیند عیب‌یابی شده است.</text:p>
        </text:list-item>
      </text:list>
      <text:p text:style-name="P24">مدار داخلی واحد اصلی را در شکل <text:span text:style-name="T18">5</text:span> مشاهده میکنید.</text:p>
      <text:p text:style-name="P9"><draw:frame draw:style-name="fr1" draw:name="Frame5" text:anchor-type="char" svg:x="-0.2327in" svg:y="0.1811in" svg:width="6.6929in" draw:z-index="1"><draw:text-box fo:min-height="4.3453in"><text:p text:style-name="P1"><draw:frame draw:style-name="fr3" draw:name="Image1" text:anchor-type="paragraph" svg:width="6.6929in" style:rel-width="100%" svg:height="4.3453in" style:rel-height="scale" draw:z-index="2"><draw:image xlink:href="Pictures/100000010000064B00000416148CCFDF.png" xlink:type="simple" xlink:show="embed" xlink:actuate="onLoad" draw:mime-type="image/png"/></draw:frame>شکل5</text:p></draw:text-box></draw:frame></text:p>
      <text:p text:style-name="P10"><text:span text:style-name="T17">در شکل</text:span><text:span text:style-name="T18">6</text:span><text:span text:style-name="T17"> نیز خروجی گرفته شده از تست بنچ را در ترمینال مشاهده میکنید.</text:span><draw:frame draw:style-name="fr1" draw:name="Frame6" text:anchor-type="char" svg:x="-0.0264in" svg:y="0.4264in" svg:width="6.6929in" draw:z-index="3"><draw:text-box fo:min-height="3.8055in"><text:p text:style-name="P1"><draw:frame draw:style-name="fr3" draw:name="Image2" text:anchor-type="paragraph" svg:width="6.6929in" style:rel-width="100%" svg:height="3.8055in" style:rel-height="scale" draw:z-index="4"><draw:image xlink:href="Pictures/100000010000077D00000442891CD1D4.png" xlink:type="simple" xlink:show="embed" xlink:actuate="onLoad" draw:mime-type="image/png"/></draw:frame>شکل6</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ystem" style:font-pitch="variable"/>
    <style:font-face style:name="F" svg:font-family="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_20__28_WW_29_"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style style:name="Heading_20_1" style:display-name="Heading 1" style:family="paragraph" style:parent-style-name="Standard_20__28_WW_29_" style:next-style-name="Standard_20__28_WW_29_" style:default-outline-level="1" style:list-style-name="" style:class="text">
      <style:paragraph-properties fo:margin-top="0.1665in" fo:margin-bottom="0.0835in" style:contextual-spacing="false" fo:keep-together="always" fo:keep-with-next="always"/>
      <style:text-properties fo:color="#2f5496" loext:opacity="100%" style:font-name="Calibri Light" fo:font-family="'Calibri Light'" style:font-family-generic="swiss" style:font-pitch="variable" fo:font-size="16pt" style:font-name-asian="F" style:font-family-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Contents_20_Heading" style:display-name="Contents Heading" style:family="paragraph" style:parent-style-name="Heading_20_1" style:next-style-name="Standard" style:default-outline-level="" style:class="index">
      <style:paragraph-properties fo:line-height="108%" fo:hyphenation-ladder-count="no-limit" style:vertical-align="auto"/>
      <style:text-properties fo:color="#2e74b5" loext:opacity="100%" style:font-name="Calibri Light" fo:font-family="'Calibri Light'" style:font-family-generic="swiss" style:font-pitch="variable" style:letter-kerning="false" style:font-name-asian="Noto Serif CJK SC" style:font-family-asian="'Noto Serif CJK SC'" style:font-family-generic-asian="system" style:font-pitch-asian="variable" style:language-asian="en" style:country-asian="US" style:font-name-complex="Noto Sans Devanagari1" style:font-family-complex="'Noto Sans Devanagari'"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Contents_20_2" style:display-name="Contents 2" style:family="paragraph" style:parent-style-name="Standard" style:next-style-name="Standard" style:class="index">
      <style:paragraph-properties fo:margin-left="0.1665in" fo:margin-top="0in" fo:margin-bottom="0.0693in" style:contextual-spacing="false" fo:text-align="justify" style:justify-single-word="false" style:writing-mode="rl-tb">
        <style:tab-stops>
          <style:tab-stop style:position="6.6862in" style:type="right" style:leader-style="dotted" style:leader-text="."/>
        </style:tab-stops>
      </style:paragraph-properties>
      <style:text-properties style:font-name-complex="Mangal" style:font-family-complex="Mangal" style:font-family-generic-complex="system" style:font-pitch-complex="variable" style:font-size-complex="10.5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1"/><text:page-number text:select-page="current">9</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4T15:58:25.088158422</meta:creation-date>
    <dc:date>2026-06-04T16:49:41.122830834</dc:date>
    <meta:editing-duration>PT51M8S</meta:editing-duration>
    <meta:editing-cycles>16</meta:editing-cycles>
    <meta:generator>LibreOffice/24.2.7.2$Linux_X86_64 LibreOffice_project/420$Build-2</meta:generator>
    <meta:document-statistic meta:table-count="0" meta:image-count="7" meta:object-count="0" meta:page-count="9" meta:paragraph-count="47" meta:word-count="1100" meta:character-count="5681" meta:non-whitespace-character-count="4635"/>
  </office:meta>
</office:document-meta>
</file>